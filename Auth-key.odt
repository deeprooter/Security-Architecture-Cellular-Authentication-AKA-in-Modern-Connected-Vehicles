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B900000063BB65D2A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margin-top="0.1252in" fo:margin-bottom="0.1665in" style:contextual-spacing="false" fo:text-indent="0in" style:auto-text-indent="false"/>
      <style:text-properties style:text-line-through-style="none" style:text-line-through-type="none" style:font-name="Google Sans" fo:font-size="12pt" style:text-underline-style="none" fo:font-weight="normal" style:text-blinking="false" loext:padding="0in" loext:border="none"/>
    </style:style>
    <style:style style:name="P2" style:family="paragraph" style:parent-style-name="Standard">
      <style:paragraph-properties fo:margin-left="0in" fo:margin-right="0in" fo:margin-top="0.25in" fo:margin-bottom="0.1252in" style:contextual-spacing="false" fo:text-indent="0in" style:auto-text-indent="false"/>
      <style:text-properties style:text-line-through-style="none" style:text-line-through-type="none" style:font-name="Google Sans" fo:font-size="15pt" style:text-underline-style="none" fo:font-weight="bold" style:text-blinking="false" loext:padding="0in" loext:border="none"/>
    </style:style>
    <style:style style:name="P3"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4" style:family="paragraph" style:parent-style-name="Text_20_body">
      <style:paragraph-properties fo:margin-left="0in" fo:margin-right="0in" fo:margin-top="0.25in" fo:margin-bottom="0.1252in" style:contextual-spacing="false" fo:text-indent="0in" style:auto-text-indent="false"/>
      <style:text-properties style:text-line-through-style="none" style:text-line-through-type="none" style:font-name="Google Sans" fo:font-size="15pt" style:text-underline-style="none" fo:font-weight="bold" style:text-blinking="false" loext:padding="0in" loext:border="none"/>
    </style:style>
    <style:style style:name="P5"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6"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7" style:family="paragraph" style:parent-style-name="Text_20_body" style:list-style-name="L4">
      <style:paragraph-properties fo:margin-left="0in" fo:margin-right="0in" fo:margin-top="0in" fo:margin-bottom="0in" style:contextual-spacing="false" fo:text-indent="0in" style:auto-text-indent="false" fo:padding="0in" fo:border="none" style:writing-mode="lr-tb"/>
    </style:style>
    <style:style style:name="P8" style:family="paragraph" style:parent-style-name="Text_20_body" style:list-style-name="L5">
      <style:paragraph-properties fo:margin-left="0in" fo:margin-right="0in" fo:margin-top="0in" fo:margin-bottom="0in" style:contextual-spacing="false" fo:text-indent="0in" style:auto-text-indent="false" fo:padding="0in" fo:border="none" style:writing-mode="lr-tb"/>
    </style:style>
    <style:style style:name="P9" style:family="paragraph" style:parent-style-name="Text_20_body" style:list-style-name="L6">
      <style:paragraph-properties fo:margin-left="0in" fo:margin-right="0in" fo:margin-top="0in" fo:margin-bottom="0in" style:contextual-spacing="false" fo:text-indent="0in" style:auto-text-indent="false" fo:padding="0in" fo:border="none" style:writing-mode="lr-tb"/>
    </style:style>
    <style:style style:name="P10" style:family="paragraph" style:parent-style-name="Text_20_body" style:list-style-name="L7">
      <style:paragraph-properties fo:margin-left="0in" fo:margin-right="0in" fo:margin-top="0in" fo:margin-bottom="0in" style:contextual-spacing="false" fo:text-indent="0in" style:auto-text-indent="false" fo:padding="0in" fo:border="none"/>
    </style:style>
    <style:style style:name="P11" style:family="paragraph" style:parent-style-name="Text_20_body" style:list-style-name="L8">
      <style:paragraph-properties fo:margin-left="0in" fo:margin-right="0in" fo:margin-top="0in" fo:margin-bottom="0in" style:contextual-spacing="false" fo:text-indent="0in" style:auto-text-indent="false" fo:padding="0in" fo:border="none"/>
    </style:style>
    <style:style style:name="P12" style:family="paragraph" style:parent-style-name="Standard">
      <style:paragraph-properties fo:margin-left="0in" fo:margin-right="0in" fo:margin-top="0.25in" fo:margin-bottom="0.1252in" style:contextual-spacing="false" fo:text-indent="0in" style:auto-text-indent="false"/>
      <style:text-properties style:text-line-through-style="none" style:text-line-through-type="none" style:font-name="Google Sans" fo:font-size="12pt" style:text-underline-style="none" fo:font-weight="bold" style:text-blinking="false" loext:padding="0in" loext:border="none"/>
    </style:style>
    <style:style style:name="P13" style:family="paragraph" style:parent-style-name="Text_20_body" style:list-style-name="L9">
      <style:paragraph-properties fo:margin-left="0in" fo:margin-right="0in" fo:margin-top="0in" fo:margin-bottom="0in" style:contextual-spacing="false" fo:text-indent="0in" style:auto-text-indent="false" fo:padding="0in" fo:border="none"/>
    </style:style>
    <style:style style:name="P14" style:family="paragraph" style:parent-style-name="Text_20_body">
      <style:paragraph-properties fo:margin-left="0in" fo:margin-right="0in" fo:margin-top="0.25in" fo:margin-bottom="0.1252in" style:contextual-spacing="false" fo:text-indent="0in" style:auto-text-indent="false"/>
      <style:text-properties style:text-line-through-style="none" style:text-line-through-type="none" style:font-name="Google Sans" fo:font-size="12pt" style:text-underline-style="none" fo:font-weight="bold" style:text-blinking="false" loext:padding="0in" loext:border="none"/>
    </style:style>
    <style:style style:name="P15" style:family="paragraph" style:parent-style-name="Text_20_body" style:list-style-name="L10">
      <style:paragraph-properties fo:margin-left="0in" fo:margin-right="0in" fo:margin-top="0in" fo:margin-bottom="0in" style:contextual-spacing="false" fo:text-indent="0in" style:auto-text-indent="false" fo:padding="0in" fo:border="none" style:writing-mode="lr-tb"/>
    </style:style>
    <style:style style:name="P16" style:family="paragraph" style:parent-style-name="Text_20_body" style:list-style-name="L11">
      <style:paragraph-properties fo:margin-left="0in" fo:margin-right="0in" fo:margin-top="0in" fo:margin-bottom="0in" style:contextual-spacing="false" fo:text-indent="0in" style:auto-text-indent="false" fo:padding="0in" fo:border="none"/>
    </style:style>
    <style:style style:name="P17" style:family="paragraph" style:parent-style-name="Text_20_body" style:list-style-name="L12">
      <style:paragraph-properties fo:margin-left="0in" fo:margin-right="0in" fo:margin-top="0in" fo:margin-bottom="0in" style:contextual-spacing="false" fo:text-indent="0in" style:auto-text-indent="false" fo:padding="0in" fo:border="none" style:writing-mode="lr-tb"/>
    </style:style>
    <style:style style:name="T1" style:family="text">
      <style:text-properties officeooo:rsid="0006a7a8"/>
    </style:style>
    <style:style style:name="T2" style:family="text">
      <style:text-properties style:text-line-through-style="none" style:text-line-through-type="none" style:font-name="Google Sans" fo:font-size="12pt" style:text-underline-style="none" fo:font-weight="bold" style:text-blinking="false" loext:padding="0in" loext:border="none"/>
    </style:style>
    <style:style style:name="T3" style:family="text">
      <style:text-properties style:text-line-through-style="none" style:text-line-through-type="none" style:font-name="Google Sans" fo:font-size="12pt" style:text-underline-style="none" fo:font-weight="normal" style:text-blinking="false" loext:padding="0in" loext:border="none"/>
    </style:style>
    <style:style style:name="T4" style:family="text">
      <style:text-properties style:text-line-through-style="none" style:text-line-through-type="none" style:font-name="Google Sans" fo:font-size="12pt" style:text-underline-style="none" fo:font-weight="normal" style:text-blinking="false"/>
    </style:style>
    <style:style style:name="T5" style:family="text">
      <style:text-properties style:text-line-through-style="none" style:text-line-through-type="none" style:font-name="Google Sans" fo:font-size="12pt" style:text-underline-style="solid" style:text-underline-width="auto" style:text-underline-color="font-color" fo:font-weight="normal" style:text-blinking="false"/>
    </style:style>
    <style:style style:name="T6" style:family="text">
      <style:text-properties style:text-line-through-style="none" style:text-line-through-type="none" fo:font-family="monospace" fo:font-size="10.5pt" style:text-underline-style="none" fo:font-weight="normal" style:text-blinking="false" loext:padding-left="0in" loext:padding-right="0in" loext:padding-top="0in" loext:padding-bottom="0.0193in" loext:border-left="none" loext:border-right="none" loext:border-top="none" loext:border-bottom="0.06pt solid #f0f2f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uthentication vectors and Key generation</text:p>
      <text:p text:style-name="Subtitle"><text:span text:style-name="T1">Following </text:span>is the exact purpose of code is executing:</text:p>
      <text:p text:style-name="P1"><draw:frame draw:style-name="fr1" draw:name="Image1" text:anchor-type="char" svg:width="6.9252in" svg:height="3.7311in" draw:z-index="0"><draw:image xlink:href="Pictures/1000000100000B900000063BB65D2A13.png" xlink:type="simple" xlink:show="embed" xlink:actuate="onLoad" draw:mime-type="image/png"/></draw:frame></text:p>
      <text:p text:style-name="P2">1. Generating IK (Integrity Key) via F4 Function</text:p>
      <text:list text:style-name="L1">
        <text:list-item>
          <text:p text:style-name="P3"><text:span text:style-name="Strong_20_Emphasis"><text:span text:style-name="T2">Purpose:</text:span></text:span><text:span text:style-name="T3"> This derives a 128-bit key used to </text:span><text:span text:style-name="Strong_20_Emphasis"><text:span text:style-name="T2">sign data packets</text:span></text:span><text:span text:style-name="T3"> sent between the mobile phone and the base station. It prevents an attacker from altering or injecting malicious commands into the network signaling.</text:span></text:p>
        </text:list-item>
      </text:list>
      <text:p text:style-name="P4">2. Generating CK (Cipher Key) via F3 Function</text:p>
      <text:list text:style-name="L2">
        <text:list-item>
          <text:p text:style-name="P5"><text:span text:style-name="Strong_20_Emphasis"><text:span text:style-name="T2">Purpose:</text:span></text:span><text:span text:style-name="T3"> This derives a 128-bit key used to </text:span><text:span text:style-name="Strong_20_Emphasis"><text:span text:style-name="T2">encrypt user data</text:span></text:span><text:span text:style-name="T3"> (voice and internet traffic). It ensures eavesdroppers cannot spy on your calls or data.</text:span></text:p>
        </text:list-item>
      </text:list>
      <text:p text:style-name="P4">3. Generating MAC (Message Authentication Code) via F1 Function</text:p>
      <text:list text:style-name="L3">
        <text:list-item>
          <text:p text:style-name="P6"><text:soft-page-break/><text:span text:style-name="Strong_20_Emphasis"><text:span text:style-name="T2">Purpose:</text:span></text:span><text:span text:style-name="T3"> This acts as a cryptographic checksum to </text:span><text:span text:style-name="Strong_20_Emphasis"><text:span text:style-name="T2">prove the network is legitimate</text:span></text:span><text:span text:style-name="T3">. It prevents a "Fake Base Station" (IMSI Catcher/Stingray) from hijacking your phone, as only a real network can generate a valid MAC using the secret key shared with your SIM card.</text:span><text:span text:style-name="T4"> [</text:span><text:a xlink:type="simple" xlink:href="https://jscrambler.com/blog/message-authentication-code" text:style-name="Internet_20_link" text:visited-style-name="Visited_20_Internet_20_Link"><text:span text:style-name="T5">1</text:span></text:a><text:span text:style-name="T4">]</text:span></text:p>
        </text:list-item>
      </text:list>
      <text:p text:style-name="P4">4. Generating XRES (Expected Response) via F2 Function</text:p>
      <text:list text:style-name="L4">
        <text:list-item>
          <text:p text:style-name="P7"><text:span text:style-name="Strong_20_Emphasis"><text:span text:style-name="T2">Purpose:</text:span></text:span><text:span text:style-name="T3"> This is the "answer" to a riddle. The network will send a random number (</text:span><text:span text:style-name="Source_20_Text"><text:span text:style-name="T6">RAND</text:span></text:span><text:span text:style-name="T3">) to the phone. The phone must use </text:span><text:span text:style-name="Source_20_Text"><text:span text:style-name="T6">RAND</text:span></text:span><text:span text:style-name="T3"> to calculate its own </text:span><text:span text:style-name="Source_20_Text"><text:span text:style-name="T6">RES</text:span></text:span><text:span text:style-name="T3">. If the phone's </text:span><text:span text:style-name="Source_20_Text"><text:span text:style-name="T6">RES</text:span></text:span><text:span text:style-name="T3"> matches the network's </text:span><text:span text:style-name="Source_20_Text"><text:span text:style-name="T6">XRES</text:span></text:span><text:span text:style-name="T3">, the network knows the phone is real.</text:span></text:p>
        </text:list-item>
      </text:list>
      <text:p text:style-name="P4">5. Assembling the AUTN (Authentication Token)</text:p>
      <text:list text:style-name="L5">
        <text:list-item>
          <text:p text:style-name="P8"><text:span text:style-name="Strong_20_Emphasis"><text:span text:style-name="T2">Purpose:</text:span></text:span><text:span text:style-name="T3"> This packages the Sequence Number (</text:span><text:span text:style-name="Source_20_Text"><text:span text:style-name="T6">SQN</text:span></text:span><text:span text:style-name="T3">), Authentication Management Field (</text:span><text:span text:style-name="Source_20_Text"><text:span text:style-name="T6">AMF</text:span></text:span><text:span text:style-name="T3">), and </text:span><text:span text:style-name="Source_20_Text"><text:span text:style-name="T6">MAC</text:span></text:span><text:span text:style-name="T3"> together. This entire block is sent to the mobile device so the phone can verify the network's identity before it sends any sensitive data.</text:span></text:p>
        </text:list-item>
      </text:list>
      <text:p text:style-name="P4">6. Constructing the Authentication Vector (V)</text:p>
      <text:list text:style-name="L6">
        <text:list-item>
          <text:p text:style-name="P9"><text:span text:style-name="Strong_20_Emphasis"><text:span text:style-name="T2">Purpose:</text:span></text:span><text:span text:style-name="T3"> This consolidates all calculated outputs (</text:span><text:span text:style-name="Source_20_Text"><text:span text:style-name="T6">RAND</text:span></text:span><text:span text:style-name="T3">, </text:span><text:span text:style-name="Source_20_Text"><text:span text:style-name="T6">XRES</text:span></text:span><text:span text:style-name="T3">, </text:span><text:span text:style-name="Source_20_Text"><text:span text:style-name="T6">CK</text:span></text:span><text:span text:style-name="T3">, </text:span><text:span text:style-name="Source_20_Text"><text:span text:style-name="T6">IK</text:span></text:span><text:span text:style-name="T3">, </text:span><text:span text:style-name="Source_20_Text"><text:span text:style-name="T6">AUTN</text:span></text:span><text:span text:style-name="T3">) into a single, standardized block of data. In a real network, the core home network generates this bundle and passes it to the local cell tower you are connecting to, giving the tower everything it needs to handle your session securely.</text:span></text:p>
        </text:list-item>
      </text:list>
      <text:p text:style-name="P4">7. Generating \(K_{ASME}\) (Access Security Management Entity Key)</text:p>
      <text:list text:style-name="L7">
        <text:list-item>
          <text:p text:style-name="P10"><text:span text:style-name="Strong_20_Emphasis"><text:span text:style-name="T2">Purpose:</text:span></text:span><text:span text:style-name="T3"> This is a </text:span><text:span text:style-name="Strong_20_Emphasis"><text:span text:style-name="T2">4G LTE specific step</text:span></text:span><text:span text:style-name="T3">. It takes components of the authentication process and derives a master key specific to the region/operator you are visiting. This key stays safely in the network core and is used to spin up temporary session keys.</text:span></text:p>
        </text:list-item>
      </text:list>
      <text:p text:style-name="P4">8. Generating \(K_{eNB}\) (eNodeB / Base Station Key)</text:p>
      <text:list text:style-name="L8">
        <text:list-item>
          <text:p text:style-name="P11"><text:span text:style-name="Strong_20_Emphasis"><text:span text:style-name="T2">Purpose:</text:span></text:span><text:span text:style-name="T3"> This derives a unique encryption key specifically for the </text:span><text:span text:style-name="Strong_20_Emphasis"><text:span text:style-name="T2">exact cell tower (eNodeB)</text:span></text:span><text:span text:style-name="T3"> your phone is connected to right now. If you drive to a new area and switch to a different cell tower, a new \(K_{eNB}\) is instantly calculated so that a breach of one physical tower doesn't compromise the whole network.</text:span></text:p>
        </text:list-item>
      </text:list>
      <text:h text:style-name="Heading_20_1" text:outline-level="1"><text:soft-page-break/>Phase-by-Phase Breakdown</text:h>
      <text:p text:style-name="P12">Phase 1: Authentication &amp; Riddle Generation</text:p>
      <text:list text:style-name="L9">
        <text:list-item>
          <text:p text:style-name="P13"><text:span text:style-name="Strong_20_Emphasis"><text:span text:style-name="T2">MAC Generation (F1):</text:span></text:span><text:span text:style-name="T3"> Processes the configuration string to create a cryptographic seal. This guarantees to the phone that the message originated from a valid cellular network.</text:span></text:p>
        </text:list-item>
        <text:list-item>
          <text:p text:style-name="P13"><text:span text:style-name="Strong_20_Emphasis"><text:span text:style-name="T2">XRES Generation (F2):</text:span></text:span><text:span text:style-name="T3"> Creates the target verification string. This is the expected answer the phone must compute to log into the tower.</text:span></text:p>
        </text:list-item>
        <text:list-item>
          <text:p text:style-name="P13"><text:span text:style-name="Strong_20_Emphasis"><text:span text:style-name="T2">AUTN Packaging:</text:span></text:span><text:span text:style-name="T3"> Concatonates the Sequence Number, Authentication Management Field, and the generated MAC into a single, cohesive network token.</text:span></text:p>
        </text:list-item>
      </text:list>
      <text:p text:style-name="P14">Phase 2: Session Key Extraction</text:p>
      <text:list text:style-name="L10">
        <text:list-item>
          <text:p text:style-name="P15"><text:span text:style-name="Strong_20_Emphasis"><text:span text:style-name="T2">Cipher Key (F3) &amp; Integrity Key (F4):</text:span></text:span><text:span text:style-name="T3"> Simultaneously derived from the base identity logs. These provide separate layers for data encryption (</text:span><text:span text:style-name="Source_20_Text"><text:span text:style-name="T6">CK</text:span></text:span><text:span text:style-name="T3">) and signal tampering protection (</text:span><text:span text:style-name="Source_20_Text"><text:span text:style-name="T6">IK</text:span></text:span><text:span text:style-name="T3">).</text:span></text:p>
        </text:list-item>
      </text:list>
      <text:p text:style-name="P14">Phase 3: Core &amp; Tower Key Derivation</text:p>
      <text:list text:style-name="L11">
        <text:list-item>
          <text:p text:style-name="P16"><text:span text:style-name="Strong_20_Emphasis"><text:span text:style-name="T2">\(K_{ASME}\) Master Key:</text:span></text:span><text:span text:style-name="T3"> Pulls global parameters to anchor a root key for the access network domain.</text:span></text:p>
        </text:list-item>
        <text:list-item>
          <text:p text:style-name="P16"><text:span text:style-name="Strong_20_Emphasis"><text:span text:style-name="T2">\(K_{eNB}\) Local Key:</text:span></text:span><text:span text:style-name="T3"> Consumes the newly generated master key to spawn a localized, single-tower encryption key.</text:span></text:p>
        </text:list-item>
      </text:list>
      <text:p text:style-name="P14">Phase 4: Bundling</text:p>
      <text:list text:style-name="L12">
        <text:list-item>
          <text:p text:style-name="P17"><text:span text:style-name="Strong_20_Emphasis"><text:span text:style-name="T2">Vector Vector (V) Assembly:</text:span></text:span><text:span text:style-name="T3"> Appends the initial </text:span><text:span text:style-name="Source_20_Text"><text:span text:style-name="T6">RAND</text:span></text:span><text:span text:style-name="T3">, the verification </text:span><text:span text:style-name="Source_20_Text"><text:span text:style-name="T6">XRES</text:span></text:span><text:span text:style-name="T3">, both session keys (</text:span><text:span text:style-name="Source_20_Text"><text:span text:style-name="T6">CK</text:span></text:span><text:span text:style-name="T3">/</text:span><text:span text:style-name="Source_20_Text"><text:span text:style-name="T6">IK</text:span></text:span><text:span text:style-name="T3">), and the network verification token (</text:span><text:span text:style-name="Source_20_Text"><text:span text:style-name="T6">AUTN</text:span></text:span><text:span text:style-name="T3">) into a unified memory buffer.</text:spa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5T03:49:57.242721382</meta:creation-date>
    <dc:date>2026-06-15T03:55:09.817813214</dc:date>
    <meta:editing-duration>PT5M15S</meta:editing-duration>
    <meta:editing-cycles>1</meta:editing-cycles>
    <meta:document-statistic meta:table-count="0" meta:image-count="1" meta:object-count="0" meta:page-count="3" meta:paragraph-count="30" meta:word-count="600" meta:character-count="3681" meta:non-whitespace-character-count="3126"/>
    <meta:generator>LibreOffice/26.2.2.2$Linux_X86_64 LibreOffice_project/620$Build-2</meta:generator>
  </office:meta>
</office:document-meta>
</file>